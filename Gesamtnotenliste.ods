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3.941cm"/>
    </style:style>
    <style:style style:name="co4" style:family="table-column">
      <style:table-column-properties fo:break-before="auto" style:column-width="0.335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0.448cm"/>
    </style:style>
    <style:style style:name="co8" style:family="table-column">
      <style:table-column-properties fo:break-before="auto" style:column-width="1.118cm"/>
    </style:style>
    <style:style style:name="co9" style:family="table-column">
      <style:table-column-properties fo:break-before="auto" style:column-width="1.148cm"/>
    </style:style>
    <style:style style:name="co10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0.587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2.09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3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01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72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ttb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bottom" style:shrink-to-fit="false" fo:border-top="none" style:vertical-align="bottom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ttb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 style:data-style-name="N153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 style:data-style-name="N156">
      <style:table-cell-properties fo:background-color="#ff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 style:data-style-name="N15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 style:data-style-name="N7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 style:data-style-name="N15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 style:data-style-name="N15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 style:data-style-name="N15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ttb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bottom" style:shrink-to-fit="false" style:vertical-align="bottom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53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Default" style:data-style-name="N153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5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Default" style:data-style-name="N15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 style:data-style-name="N15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5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5" style:family="table-cell" style:parent-style-name="Default" style:data-style-name="N15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6" style:family="table-cell" style:parent-style-name="Default" style:data-style-name="N15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 style:data-style-name="N15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lr-tb"/>
    </style:style>
    <style:style style:name="ce7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1" style:family="table-cell" style:parent-style-name="Default" style:data-style-name="N156">
      <style:table-cell-properties fo:border-bottom="0.74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3" style:family="table-cell" style:parent-style-name="Default" style:data-style-name="N1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Default" style:data-style-name="N153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none" style:direction="ttb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0" style:family="table-cell" style:parent-style-name="Default" style:data-style-name="N153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1M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29"/>
        <table:table-column table:style-name="co6" table:number-columns-repeated="2" table:default-cell-style-name="ce29"/>
        <table:table-column table:style-name="co7" table:default-cell-style-name="ce46"/>
        <table:table-column table:style-name="co8" table:number-columns-repeated="14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46"/>
        <table:table-column table:style-name="co8" table:number-columns-repeated="9" table:default-cell-style-name="ce46"/>
        <table:table-column table:style-name="co8" table:number-columns-repeated="2" table:default-cell-style-name="ce29"/>
        <table:table-column table:style-name="co10" table:number-columns-repeated="2" table:default-cell-style-name="ce29"/>
        <table:table-column table:style-name="co11" table:default-cell-style-name="ce46"/>
        <table:table-column table:style-name="co6" table:number-columns-repeated="11" table:default-cell-style-name="ce29"/>
        <table:table-column table:style-name="co10" table:number-columns-repeated="2" table:default-cell-style-name="ce29"/>
        <table:table-column table:style-name="co11" table:default-cell-style-name="ce46"/>
        <table:table-column table:style-name="co6" table:number-columns-repeated="11" table:default-cell-style-name="ce29"/>
        <table:table-column table:style-name="co10" table:number-columns-repeated="2" table:default-cell-style-name="ce29"/>
        <table:table-column table:style-name="co12" table:default-cell-style-name="Default"/>
        <table:table-column table:style-name="co13" table:number-columns-repeated="954" table:default-cell-style-name="Default"/>
        <table:table-row table:style-name="ro1">
          <table:table-cell table:style-name="ce1" office:value-type="string" calcext:value-type="string">
            <text:p>2025/26</text:p>
          </table:table-cell>
          <table:table-cell table:style-name="ce1"/>
          <table:table-cell table:style-name="ce1" office:value-type="string" calcext:value-type="string">
            <text:p>E1ME1</text:p>
          </table:table-cell>
          <table:table-cell table:style-name="ce1"/>
          <table:table-cell table:style-name="ce20"/>
          <table:table-cell table:style-name="ce21" table:number-columns-repeated="2"/>
          <table:table-cell table:style-name="ce32" table:formula="of:=NOW()" office:value-type="date" office:date-value="2026-07-02T19:51:07.84981" calcext:value-type="date" table:number-columns-spanned="18" table:number-rows-spanned="1">
            <text:p>02.07.2026 19:51</text:p>
          </table:table-cell>
          <table:covered-table-cell table:number-columns-repeated="17" table:style-name="ce35"/>
          <table:table-cell table:style-name="ce21"/>
          <table:table-cell table:style-name="ce39" table:number-columns-repeated="10"/>
          <table:table-cell table:style-name="ce21" table:number-columns-repeated="4"/>
          <table:table-cell table:style-name="ce39"/>
          <table:table-cell table:style-name="ce21" table:number-columns-repeated="13"/>
          <table:table-cell table:style-name="ce39"/>
          <table:table-cell table:style-name="ce21" table:number-columns-repeated="13"/>
          <table:table-cell table:style-name="ce2" table:number-columns-repeated="955"/>
        </table:table-row>
        <table:table-row table:style-name="ro1">
          <table:table-cell table:style-name="ce2" table:number-columns-repeated="4"/>
          <table:table-cell table:style-name="ce21" table:number-columns-repeated="5"/>
          <table:table-cell table:style-name="ce39"/>
          <table:table-cell table:style-name="ce21" table:number-columns-repeated="16"/>
          <table:table-cell table:style-name="ce39" table:number-columns-repeated="10"/>
          <table:table-cell table:style-name="ce21" table:number-columns-repeated="4"/>
          <table:table-cell table:style-name="ce39"/>
          <table:table-cell table:style-name="ce21" table:number-columns-repeated="13"/>
          <table:table-cell table:style-name="ce39"/>
          <table:table-cell table:style-name="ce21" table:number-columns-repeated="13"/>
          <table:table-cell table:style-name="ce2" table:number-columns-repeated="955"/>
        </table:table-row>
        <table:table-row table:style-name="ro2">
          <table:table-cell table:style-name="ce3"/>
          <table:table-cell table:style-name="ce93" office:value-type="string" calcext:value-type="string">
            <text:p>Klassenlehrer</text:p>
          </table:table-cell>
          <table:table-cell table:style-name="ce99" office:value-type="string" calcext:value-type="string">
            <text:p>xxx</text:p>
          </table:table-cell>
          <table:table-cell table:style-name="ce3"/>
          <table:table-cell table:style-name="ce22" table:number-columns-repeated="5"/>
          <table:table-cell table:style-name="ce40"/>
          <table:table-cell table:style-name="ce47" office:value-type="string" calcext:value-type="string">
            <text:p>BFK- Teilnoten</text:p>
          </table:table-cell>
          <table:table-cell table:style-name="ce53"/>
          <table:table-cell table:style-name="ce57" table:number-columns-repeated="11"/>
          <table:table-cell table:style-name="ce62"/>
          <table:table-cell table:style-name="ce22" table:number-columns-repeated="2"/>
          <table:table-cell table:style-name="ce75"/>
          <table:table-cell table:style-name="ce47" office:value-type="string" calcext:value-type="string">
            <text:p>PK- Teilnoten</text:p>
          </table:table-cell>
          <table:table-cell table:style-name="ce57" table:number-columns-repeated="9"/>
          <table:table-cell table:style-name="ce62"/>
          <table:table-cell table:style-name="ce22" table:number-columns-repeated="2"/>
          <table:table-cell table:style-name="ce75"/>
          <table:table-cell table:style-name="ce47" office:value-type="string" calcext:value-type="string">
            <text:p>Verhalten-Teilnoten</text:p>
          </table:table-cell>
          <table:table-cell table:style-name="ce57" table:number-columns-repeated="9"/>
          <table:table-cell table:style-name="ce62"/>
          <table:table-cell table:style-name="ce22" table:number-columns-repeated="2"/>
          <table:table-cell table:style-name="ce75"/>
          <table:table-cell table:style-name="ce47" office:value-type="string" calcext:value-type="string">
            <text:p>Mitarbeit-Teilnoten</text:p>
          </table:table-cell>
          <table:table-cell table:style-name="ce57" table:number-columns-repeated="9"/>
          <table:table-cell table:style-name="ce62"/>
          <table:table-cell table:style-name="ce22" table:number-columns-repeated="2"/>
          <table:table-cell table:style-name="ce3" table:number-columns-repeated="955"/>
        </table:table-row>
        <table:table-row table:style-name="ro3">
          <table:table-cell table:style-name="ce3"/>
          <table:table-cell table:style-name="ce9" office:value-type="string" calcext:value-type="string">
            <text:p>Fach</text:p>
          </table:table-cell>
          <table:table-cell table:style-name="ce15"/>
          <table:table-cell table:style-name="ce17"/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Gk</text:p>
          </table:table-cell>
          <table:table-cell table:style-name="ce23" office:value-type="string" calcext:value-type="string">
            <text:p>WK</text:p>
          </table:table-cell>
          <table:table-cell table:style-name="ce23" office:value-type="string" calcext:value-type="string">
            <text:p>TE</text:p>
          </table:table-cell>
          <table:table-cell table:style-name="ce23" office:value-type="string" calcext:value-type="string">
            <text:p>REL</text:p>
          </table:table-cell>
          <table:table-cell table:style-name="ce41"/>
          <table:table-cell table:style-name="ce48" office:value-type="string" calcext:value-type="string">
            <text:p>BT-E (el.)</text:p>
          </table:table-cell>
          <table:table-cell table:style-name="ce54" table:number-columns-repeated="2"/>
          <table:table-cell table:style-name="ce58"/>
          <table:table-cell table:style-name="ce48" office:value-type="string" calcext:value-type="string">
            <text:p>BT-L (el.)</text:p>
          </table:table-cell>
          <table:table-cell table:style-name="ce58"/>
          <table:table-cell table:style-name="ce48" office:value-type="string" calcext:value-type="string">
            <text:p>BT-W (el.)</text:p>
          </table:table-cell>
          <table:table-cell table:style-name="ce58"/>
          <table:table-cell table:style-name="ce48" office:value-type="string" calcext:value-type="string">
            <text:p>BT (me.)</text:p>
          </table:table-cell>
          <table:table-cell table:style-name="ce58"/>
          <table:table-cell table:style-name="ce48" office:value-type="string" calcext:value-type="string">
            <text:p>BT-L (me.)</text:p>
          </table:table-cell>
          <table:table-cell table:style-name="ce58"/>
          <table:table-cell table:style-name="ce49" office:value-type="string" calcext:value-type="string">
            <text:p>BT-W (me.)</text:p>
          </table:table-cell>
          <table:table-cell table:style-name="ce58"/>
          <table:table-cell table:style-name="ce68" office:value-type="string" calcext:value-type="string" table:number-columns-spanned="1" table:number-rows-spanned="2">
            <text:p>BFK</text:p>
          </table:table-cell>
          <table:table-cell table:style-name="ce68" office:value-type="string" calcext:value-type="string" table:number-columns-spanned="1" table:number-rows-spanned="2">
            <text:p>BFK</text:p>
          </table:table-cell>
          <table:table-cell table:style-name="ce76"/>
          <table:table-cell table:number-columns-repeated="11" table:style-name="ce169" office:value-type="string" calcext:value-type="string">
            <text:p>PK</text:p>
          </table:table-cell>
          <table:table-cell table:style-name="ce68" office:value-type="string" calcext:value-type="string" table:number-columns-spanned="1" table:number-rows-spanned="2">
            <text:p>PK</text:p>
          </table:table-cell>
          <table:table-cell table:style-name="ce68" office:value-type="string" calcext:value-type="string" table:number-columns-spanned="1" table:number-rows-spanned="2">
            <text:p>PK</text:p>
          </table:table-cell>
          <table:table-cell table:style-name="ce76"/>
          <table:table-cell table:number-columns-repeated="11" table:style-name="ce169" office:value-type="string" calcext:value-type="string">
            <text:p>Verhalten</text:p>
          </table:table-cell>
          <table:table-cell table:style-name="ce68" office:value-type="string" calcext:value-type="string" table:number-columns-spanned="1" table:number-rows-spanned="2">
            <text:p>Verhalten</text:p>
          </table:table-cell>
          <table:table-cell table:style-name="ce68" office:value-type="string" calcext:value-type="string" table:number-columns-spanned="1" table:number-rows-spanned="2">
            <text:p>Verhalten</text:p>
          </table:table-cell>
          <table:table-cell table:style-name="ce76"/>
          <table:table-cell table:number-columns-repeated="11" table:style-name="ce169" office:value-type="string" calcext:value-type="string">
            <text:p>Mitarbeit</text:p>
          </table:table-cell>
          <table:table-cell table:style-name="ce68" office:value-type="string" calcext:value-type="string" table:number-columns-spanned="1" table:number-rows-spanned="2">
            <text:p>Mitarbeit</text:p>
          </table:table-cell>
          <table:table-cell table:style-name="ce68" office:value-type="string" calcext:value-type="string" table:number-columns-spanned="1" table:number-rows-spanned="2">
            <text:p>Mitarbeit</text:p>
          </table:table-cell>
          <table:table-cell table:style-name="ce3" table:number-columns-repeated="955"/>
        </table:table-row>
        <table:table-row table:style-name="ro4">
          <table:table-cell table:style-name="ce3"/>
          <table:table-cell table:style-name="ce10" office:value-type="string" calcext:value-type="string">
            <text:p>Lehrer(in) -Kürzel</text:p>
          </table:table-cell>
          <table:table-cell table:style-name="ce16"/>
          <table:table-cell table:style-name="ce17"/>
          <table:table-cell table:number-columns-repeated="5" table:style-name="ce136" office:value-type="string" calcext:value-type="string">
            <text:p>x</text:p>
          </table:table-cell>
          <table:table-cell table:style-name="ce155"/>
          <table:table-cell table:style-name="ce163" office:value-type="string" calcext:value-type="string">
            <text:p>x</text:p>
          </table:table-cell>
          <table:table-cell table:style-name="ce163" office:value-type="string" calcext:value-type="string">
            <text:p>xxx</text:p>
          </table:table-cell>
          <table:table-cell table:number-columns-repeated="12" table:style-name="ce163" office:value-type="string" calcext:value-type="string">
            <text:p>x</text:p>
          </table:table-cell>
          <table:covered-table-cell table:number-columns-repeated="2" table:style-name="ce69"/>
          <table:table-cell table:style-name="ce77"/>
          <table:table-cell table:number-columns-repeated="7" table:style-name="ce163" office:value-type="string" calcext:value-type="string">
            <text:p>x</text:p>
          </table:table-cell>
          <table:table-cell table:number-columns-repeated="4" table:style-name="ce136" office:value-type="string" calcext:value-type="string">
            <text:p>x</text:p>
          </table:table-cell>
          <table:covered-table-cell table:number-columns-repeated="2" table:style-name="ce69"/>
          <table:table-cell table:style-name="ce77"/>
          <table:table-cell table:number-columns-repeated="11" table:style-name="ce163" office:value-type="string" calcext:value-type="string">
            <text:p>x</text:p>
          </table:table-cell>
          <table:covered-table-cell table:number-columns-repeated="2" table:style-name="ce69"/>
          <table:table-cell table:style-name="ce77"/>
          <table:table-cell table:number-columns-repeated="11" table:style-name="ce163" office:value-type="string" calcext:value-type="string">
            <text:p>x</text:p>
          </table:table-cell>
          <table:covered-table-cell table:number-columns-repeated="2" table:style-name="ce69"/>
          <table:table-cell table:style-name="ce3" table:number-columns-repeated="955"/>
        </table:table-row>
        <table:table-row table:style-name="ro4">
          <table:table-cell table:style-name="ce3"/>
          <table:table-cell table:style-name="ce10" office:value-type="string" calcext:value-type="string">
            <text:p>Noten (Gewicht)</text:p>
          </table:table-cell>
          <table:table-cell table:style-name="ce16"/>
          <table:table-cell table:style-name="ce17"/>
          <table:table-cell table:style-name="ce24" table:number-columns-repeated="5"/>
          <table:table-cell table:style-name="ce155"/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8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24"/>
          <table:table-cell table:style-name="ce77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table:number-columns-repeated="5"/>
          <table:table-cell table:style-name="ce63" table:number-columns-repeated="3"/>
          <table:table-cell table:style-name="ce24" table:number-columns-repeated="2"/>
          <table:table-cell table:style-name="ce77"/>
          <table:table-cell table:style-name="ce63" table:number-columns-repeated="11"/>
          <table:table-cell table:style-name="ce24" table:number-columns-repeated="2"/>
          <table:table-cell table:style-name="ce77"/>
          <table:table-cell table:style-name="ce50" table:number-columns-repeated="11"/>
          <table:table-cell table:style-name="ce24" table:number-columns-repeated="2"/>
          <table:table-cell table:style-name="ce3" table:number-columns-repeated="955"/>
        </table:table-row>
        <table:table-row table:style-name="ro5">
          <table:table-cell table:style-name="ce2" table:number-columns-repeated="4"/>
          <table:table-cell table:style-name="ce21" table:number-columns-repeated="5"/>
          <table:table-cell table:style-name="ce39"/>
          <table:table-cell table:style-name="ce21" table:number-columns-repeated="14"/>
          <table:table-cell table:style-name="ce39" table:number-columns-repeated="3"/>
          <table:table-cell table:style-name="ce79"/>
          <table:table-cell table:style-name="ce39" table:number-columns-repeated="8"/>
          <table:table-cell table:style-name="ce21" table:number-columns-repeated="4"/>
          <table:table-cell table:style-name="ce39"/>
          <table:table-cell table:style-name="ce79"/>
          <table:table-cell table:style-name="ce39" table:number-columns-repeated="8"/>
          <table:table-cell table:style-name="ce21" table:number-columns-repeated="4"/>
          <table:table-cell table:style-name="ce39"/>
          <table:table-cell table:style-name="ce79"/>
          <table:table-cell table:style-name="ce39" table:number-columns-repeated="8"/>
          <table:table-cell table:style-name="ce21" table:number-columns-repeated="4"/>
          <table:table-cell table:style-name="ce2" table:number-columns-repeated="955"/>
        </table:table-row>
        <table:table-row table:style-name="ro6">
          <table:table-cell table:style-name="ce4" office:value-type="string" calcext:value-type="string">
            <text:p>N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orname</text:p>
          </table:table-cell>
          <table:table-cell table:style-name="ce18"/>
          <table:table-cell table:number-columns-repeated="4" table:style-name="ce25" office:value-type="string" calcext:value-type="string">
            <text:p>1.HJ</text:p>
          </table:table-cell>
          <table:table-cell table:style-name="ce36" office:value-type="string" calcext:value-type="string">
            <text:p>1HJ</text:p>
          </table:table-cell>
          <table:table-cell table:style-name="ce43"/>
          <table:table-cell table:style-name="ce25" office:value-type="string" calcext:value-type="string">
            <text:p>1.HJ</text:p>
          </table:table-cell>
          <table:table-cell table:style-name="ce25" office:value-type="string" calcext:value-type="string">
            <text:p>2HJ</text:p>
          </table:table-cell>
          <table:table-cell table:style-name="ce25"/>
          <table:table-cell table:style-name="ce59"/>
          <table:table-cell table:style-name="ce25" office:value-type="string" calcext:value-type="string">
            <text:p>1.HJ</text:p>
          </table:table-cell>
          <table:table-cell table:style-name="ce59"/>
          <table:table-cell table:style-name="ce25" office:value-type="string" calcext:value-type="string">
            <text:p>1.HJ</text:p>
          </table:table-cell>
          <table:table-cell table:style-name="ce59"/>
          <table:table-cell table:style-name="ce25" office:value-type="string" calcext:value-type="string">
            <text:p>1.HJ</text:p>
          </table:table-cell>
          <table:table-cell table:style-name="ce59"/>
          <table:table-cell table:style-name="ce25" office:value-type="string" calcext:value-type="string">
            <text:p>1.HJ</text:p>
          </table:table-cell>
          <table:table-cell table:style-name="ce59"/>
          <table:table-cell table:style-name="ce25" office:value-type="string" calcext:value-type="string">
            <text:p>1.HJ</text:p>
          </table:table-cell>
          <table:table-cell table:style-name="ce64"/>
          <table:table-cell table:style-name="ce70" office:value-type="string" calcext:value-type="string">
            <text:p>BFK</text:p>
          </table:table-cell>
          <table:table-cell table:style-name="ce72" office:value-type="string" calcext:value-type="string">
            <text:p>BFK</text:p>
          </table:table-cell>
          <table:table-cell table:style-name="ce78"/>
          <table:table-cell table:style-name="ce25" office:value-type="string" calcext:value-type="string">
            <text:p>1HJ</text:p>
          </table:table-cell>
          <table:table-cell table:number-columns-repeated="10" table:style-name="ce59" office:value-type="string" calcext:value-type="string">
            <text:p>1HJ</text:p>
          </table:table-cell>
          <table:table-cell table:style-name="ce70" office:value-type="string" calcext:value-type="string">
            <text:p>PK</text:p>
          </table:table-cell>
          <table:table-cell table:style-name="ce72" office:value-type="string" calcext:value-type="string">
            <text:p>PK</text:p>
          </table:table-cell>
          <table:table-cell table:style-name="ce78"/>
          <table:table-cell table:number-columns-repeated="11" table:style-name="ce81" office:value-type="string" calcext:value-type="string">
            <text:p>V</text:p>
          </table:table-cell>
          <table:table-cell table:style-name="ce70" office:value-type="string" calcext:value-type="string">
            <text:p>V</text:p>
          </table:table-cell>
          <table:table-cell table:style-name="ce72" office:value-type="string" calcext:value-type="string">
            <text:p>V</text:p>
          </table:table-cell>
          <table:table-cell table:style-name="ce78"/>
          <table:table-cell table:number-columns-repeated="11" table:style-name="ce81" office:value-type="string" calcext:value-type="string">
            <text:p>M</text:p>
          </table:table-cell>
          <table:table-cell table:style-name="ce70" office:value-type="string" calcext:value-type="string">
            <text:p>M</text:p>
          </table:table-cell>
          <table:table-cell table:style-name="ce72" office:value-type="string" calcext:value-type="string">
            <text:p>M</text:p>
          </table:table-cell>
          <table:table-cell table:number-columns-repeated="955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me1</text:p>
          </table:table-cell>
          <table:table-cell table:style-name="ce11" office:value-type="string" calcext:value-type="string">
            <text:p>vorname1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7" office:value-type="string" calcext:value-type="string">
            <text:p>-</text:p>
          </table:table-cell>
          <table:table-cell table:style-name="ce44"/>
          <table:table-cell table:style-name="ce51"/>
          <table:table-cell table:style-name="ce55" table:number-columns-repeated="2"/>
          <table:table-cell table:style-name="ce60"/>
          <table:table-cell table:style-name="ce55" table:number-columns-repeated="9"/>
          <table:table-cell table:style-name="ce65"/>
          <table:table-cell table:style-name="ce71" table:formula="of:=IFERROR(SUMPRODUCT([.K9:.X9];[.K$6:.X$6])/SUMPRODUCT(([.K9:.X9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5" table:number-columns-repeated="9"/>
          <table:table-cell table:style-name="ce65"/>
          <table:table-cell table:style-name="ce71" table:formula="of:=IFERROR(SUMPRODUCT([.AB9:.AL9];[.AB$6:.AL$6])/SUMPRODUCT(([.AB9:.AL9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5" table:number-columns-repeated="10"/>
          <table:table-cell table:style-name="ce71" table:formula="of:=IFERROR(SUMPRODUCT([.AP9:.AZ9];[.AP$6:.AZ$6])/SUMPRODUCT(([.AP9:.AZ9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5" table:number-columns-repeated="10"/>
          <table:table-cell table:style-name="ce71" table:formula="of:=IFERROR(SUMPRODUCT([.BD9:.BN9];[.BD$6:.BN$6])/SUMPRODUCT(([.BD9:.BN9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name2</text:p>
          </table:table-cell>
          <table:table-cell table:style-name="ce11" office:value-type="string" calcext:value-type="string">
            <text:p>vorname2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10:.X10];[.K$6:.X$6])/SUMPRODUCT(([.K10:.X10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10:.AL10];[.AB$6:.AL$6])/SUMPRODUCT(([.AB10:.AL10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10:.AZ10];[.AP$6:.AZ$6])/SUMPRODUCT(([.AP10:.AZ10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10:.BN10];[.BD$6:.BN$6])/SUMPRODUCT(([.BD10:.BN10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name3</text:p>
          </table:table-cell>
          <table:table-cell table:style-name="ce11" office:value-type="string" calcext:value-type="string">
            <text:p>vorname3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11:.X11];[.K$6:.X$6])/SUMPRODUCT(([.K11:.X11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11:.AL11];[.AB$6:.AL$6])/SUMPRODUCT(([.AB11:.AL11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11:.AZ11];[.AP$6:.AZ$6])/SUMPRODUCT(([.AP11:.AZ11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11:.BN11];[.BD$6:.BN$6])/SUMPRODUCT(([.BD11:.BN11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name4</text:p>
          </table:table-cell>
          <table:table-cell table:style-name="ce11" office:value-type="string" calcext:value-type="string">
            <text:p>vorname4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12:.X12];[.K$6:.X$6])/SUMPRODUCT(([.K12:.X12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12:.AL12];[.AB$6:.AL$6])/SUMPRODUCT(([.AB12:.AL12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12:.AZ12];[.AP$6:.AZ$6])/SUMPRODUCT(([.AP12:.AZ12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12:.BN12];[.BD$6:.BN$6])/SUMPRODUCT(([.BD12:.BN12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5" calcext:value-type="float">
            <text:p>5</text:p>
          </table:table-cell>
          <table:table-cell table:style-name="ce11" office:value-type="string" calcext:value-type="string">
            <text:p>name5</text:p>
          </table:table-cell>
          <table:table-cell table:style-name="ce11" office:value-type="string" calcext:value-type="string">
            <text:p>vorname5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13:.X13];[.K$6:.X$6])/SUMPRODUCT(([.K13:.X13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13:.AL13];[.AB$6:.AL$6])/SUMPRODUCT(([.AB13:.AL13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13:.AZ13];[.AP$6:.AZ$6])/SUMPRODUCT(([.AP13:.AZ13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13:.BN13];[.BD$6:.BN$6])/SUMPRODUCT(([.BD13:.BN13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name6</text:p>
          </table:table-cell>
          <table:table-cell table:style-name="ce11" office:value-type="string" calcext:value-type="string">
            <text:p>vorname6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14:.X14];[.K$6:.X$6])/SUMPRODUCT(([.K14:.X14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14:.AL14];[.AB$6:.AL$6])/SUMPRODUCT(([.AB14:.AL14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14:.AZ14];[.AP$6:.AZ$6])/SUMPRODUCT(([.AP14:.AZ14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14:.BN14];[.BD$6:.BN$6])/SUMPRODUCT(([.BD14:.BN14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7" calcext:value-type="float">
            <text:p>7</text:p>
          </table:table-cell>
          <table:table-cell table:style-name="ce11" office:value-type="string" calcext:value-type="string">
            <text:p>name7</text:p>
          </table:table-cell>
          <table:table-cell table:style-name="ce11" office:value-type="string" calcext:value-type="string">
            <text:p>vorname7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15:.X15];[.K$6:.X$6])/SUMPRODUCT(([.K15:.X15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15:.AL15];[.AB$6:.AL$6])/SUMPRODUCT(([.AB15:.AL15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15:.AZ15];[.AP$6:.AZ$6])/SUMPRODUCT(([.AP15:.AZ15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15:.BN15];[.BD$6:.BN$6])/SUMPRODUCT(([.BD15:.BN15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name8</text:p>
          </table:table-cell>
          <table:table-cell table:style-name="ce11" office:value-type="string" calcext:value-type="string">
            <text:p>vorname8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16:.X16];[.K$6:.X$6])/SUMPRODUCT(([.K16:.X16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16:.AL16];[.AB$6:.AL$6])/SUMPRODUCT(([.AB16:.AL16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16:.AZ16];[.AP$6:.AZ$6])/SUMPRODUCT(([.AP16:.AZ16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16:.BN16];[.BD$6:.BN$6])/SUMPRODUCT(([.BD16:.BN16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9" calcext:value-type="float">
            <text:p>9</text:p>
          </table:table-cell>
          <table:table-cell table:style-name="ce11" office:value-type="string" calcext:value-type="string">
            <text:p>name9</text:p>
          </table:table-cell>
          <table:table-cell table:style-name="ce11" office:value-type="string" calcext:value-type="string">
            <text:p>vorname9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17:.X17];[.K$6:.X$6])/SUMPRODUCT(([.K17:.X17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17:.AL17];[.AB$6:.AL$6])/SUMPRODUCT(([.AB17:.AL17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17:.AZ17];[.AP$6:.AZ$6])/SUMPRODUCT(([.AP17:.AZ17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17:.BN17];[.BD$6:.BN$6])/SUMPRODUCT(([.BD17:.BN17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name10</text:p>
          </table:table-cell>
          <table:table-cell table:style-name="ce11" office:value-type="string" calcext:value-type="string">
            <text:p>vorname10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18:.X18];[.K$6:.X$6])/SUMPRODUCT(([.K18:.X18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18:.AL18];[.AB$6:.AL$6])/SUMPRODUCT(([.AB18:.AL18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18:.AZ18];[.AP$6:.AZ$6])/SUMPRODUCT(([.AP18:.AZ18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18:.BN18];[.BD$6:.BN$6])/SUMPRODUCT(([.BD18:.BN18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11" calcext:value-type="float">
            <text:p>11</text:p>
          </table:table-cell>
          <table:table-cell table:style-name="ce11" office:value-type="string" calcext:value-type="string">
            <text:p>name11</text:p>
          </table:table-cell>
          <table:table-cell table:style-name="ce11" office:value-type="string" calcext:value-type="string">
            <text:p>vorname11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19:.X19];[.K$6:.X$6])/SUMPRODUCT(([.K19:.X19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19:.AL19];[.AB$6:.AL$6])/SUMPRODUCT(([.AB19:.AL19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19:.AZ19];[.AP$6:.AZ$6])/SUMPRODUCT(([.AP19:.AZ19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19:.BN19];[.BD$6:.BN$6])/SUMPRODUCT(([.BD19:.BN19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12" calcext:value-type="float">
            <text:p>12</text:p>
          </table:table-cell>
          <table:table-cell table:style-name="ce11" office:value-type="string" calcext:value-type="string">
            <text:p>name12</text:p>
          </table:table-cell>
          <table:table-cell table:style-name="ce11" office:value-type="string" calcext:value-type="string">
            <text:p>vorname12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20:.X20];[.K$6:.X$6])/SUMPRODUCT(([.K20:.X20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20:.AL20];[.AB$6:.AL$6])/SUMPRODUCT(([.AB20:.AL20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20:.AZ20];[.AP$6:.AZ$6])/SUMPRODUCT(([.AP20:.AZ20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20:.BN20];[.BD$6:.BN$6])/SUMPRODUCT(([.BD20:.BN20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13" calcext:value-type="float">
            <text:p>13</text:p>
          </table:table-cell>
          <table:table-cell table:style-name="ce11" office:value-type="string" calcext:value-type="string">
            <text:p>name13</text:p>
          </table:table-cell>
          <table:table-cell table:style-name="ce11" office:value-type="string" calcext:value-type="string">
            <text:p>vorname13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21:.X21];[.K$6:.X$6])/SUMPRODUCT(([.K21:.X21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21:.AL21];[.AB$6:.AL$6])/SUMPRODUCT(([.AB21:.AL21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21:.AZ21];[.AP$6:.AZ$6])/SUMPRODUCT(([.AP21:.AZ21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21:.BN21];[.BD$6:.BN$6])/SUMPRODUCT(([.BD21:.BN21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14" calcext:value-type="float">
            <text:p>14</text:p>
          </table:table-cell>
          <table:table-cell table:style-name="ce11" office:value-type="string" calcext:value-type="string">
            <text:p>name14</text:p>
          </table:table-cell>
          <table:table-cell table:style-name="ce11" office:value-type="string" calcext:value-type="string">
            <text:p>vorname14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22:.X22];[.K$6:.X$6])/SUMPRODUCT(([.K22:.X22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22:.AL22];[.AB$6:.AL$6])/SUMPRODUCT(([.AB22:.AL22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22:.AZ22];[.AP$6:.AZ$6])/SUMPRODUCT(([.AP22:.AZ22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22:.BN22];[.BD$6:.BN$6])/SUMPRODUCT(([.BD22:.BN22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15" calcext:value-type="float">
            <text:p>15</text:p>
          </table:table-cell>
          <table:table-cell table:style-name="ce11" office:value-type="string" calcext:value-type="string">
            <text:p>name15</text:p>
          </table:table-cell>
          <table:table-cell table:style-name="ce11" office:value-type="string" calcext:value-type="string">
            <text:p>vorname15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23:.X23];[.K$6:.X$6])/SUMPRODUCT(([.K23:.X23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23:.AL23];[.AB$6:.AL$6])/SUMPRODUCT(([.AB23:.AL23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23:.AZ23];[.AP$6:.AZ$6])/SUMPRODUCT(([.AP23:.AZ23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23:.BN23];[.BD$6:.BN$6])/SUMPRODUCT(([.BD23:.BN23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16" calcext:value-type="float">
            <text:p>16</text:p>
          </table:table-cell>
          <table:table-cell table:style-name="ce11" office:value-type="string" calcext:value-type="string">
            <text:p>name16</text:p>
          </table:table-cell>
          <table:table-cell table:style-name="ce11" office:value-type="string" calcext:value-type="string">
            <text:p>vorname16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24:.X24];[.K$6:.X$6])/SUMPRODUCT(([.K24:.X24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24:.AL24];[.AB$6:.AL$6])/SUMPRODUCT(([.AB24:.AL24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24:.AZ24];[.AP$6:.AZ$6])/SUMPRODUCT(([.AP24:.AZ24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24:.BN24];[.BD$6:.BN$6])/SUMPRODUCT(([.BD24:.BN24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17" calcext:value-type="float">
            <text:p>17</text:p>
          </table:table-cell>
          <table:table-cell table:style-name="ce11" office:value-type="string" calcext:value-type="string">
            <text:p>name17</text:p>
          </table:table-cell>
          <table:table-cell table:style-name="ce11" office:value-type="string" calcext:value-type="string">
            <text:p>vorname17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25:.X25];[.K$6:.X$6])/SUMPRODUCT(([.K25:.X25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25:.AL25];[.AB$6:.AL$6])/SUMPRODUCT(([.AB25:.AL25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25:.AZ25];[.AP$6:.AZ$6])/SUMPRODUCT(([.AP25:.AZ25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25:.BN25];[.BD$6:.BN$6])/SUMPRODUCT(([.BD25:.BN25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18" calcext:value-type="float">
            <text:p>18</text:p>
          </table:table-cell>
          <table:table-cell table:style-name="ce11" office:value-type="string" calcext:value-type="string">
            <text:p>name18</text:p>
          </table:table-cell>
          <table:table-cell table:style-name="ce11" office:value-type="string" calcext:value-type="string">
            <text:p>vorname18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26:.X26];[.K$6:.X$6])/SUMPRODUCT(([.K26:.X26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26:.AL26];[.AB$6:.AL$6])/SUMPRODUCT(([.AB26:.AL26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26:.AZ26];[.AP$6:.AZ$6])/SUMPRODUCT(([.AP26:.AZ26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26:.BN26];[.BD$6:.BN$6])/SUMPRODUCT(([.BD26:.BN26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19" calcext:value-type="float">
            <text:p>19</text:p>
          </table:table-cell>
          <table:table-cell table:style-name="ce11" office:value-type="string" calcext:value-type="string">
            <text:p>name19</text:p>
          </table:table-cell>
          <table:table-cell table:style-name="ce11" office:value-type="string" calcext:value-type="string">
            <text:p>vorname19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27:.X27];[.K$6:.X$6])/SUMPRODUCT(([.K27:.X27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27:.AL27];[.AB$6:.AL$6])/SUMPRODUCT(([.AB27:.AL27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27:.AZ27];[.AP$6:.AZ$6])/SUMPRODUCT(([.AP27:.AZ27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27:.BN27];[.BD$6:.BN$6])/SUMPRODUCT(([.BD27:.BN27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20" calcext:value-type="float">
            <text:p>20</text:p>
          </table:table-cell>
          <table:table-cell table:style-name="ce11" office:value-type="string" calcext:value-type="string">
            <text:p>name20</text:p>
          </table:table-cell>
          <table:table-cell table:style-name="ce11" office:value-type="string" calcext:value-type="string">
            <text:p>vorname20</text:p>
          </table:table-cell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28:.X28];[.K$6:.X$6])/SUMPRODUCT(([.K28:.X28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28:.AL28];[.AB$6:.AL$6])/SUMPRODUCT(([.AB28:.AL28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28:.AZ28];[.AP$6:.AZ$6])/SUMPRODUCT(([.AP28:.AZ28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28:.BN28];[.BD$6:.BN$6])/SUMPRODUCT(([.BD28:.BN28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29:.X29];[.K$6:.X$6])/SUMPRODUCT(([.K29:.X29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29:.AL29];[.AB$6:.AL$6])/SUMPRODUCT(([.AB29:.AL29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29:.AZ29];[.AP$6:.AZ$6])/SUMPRODUCT(([.AP29:.AZ29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29:.BN29];[.BD$6:.BN$6])/SUMPRODUCT(([.BD29:.BN29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30:.X30];[.K$6:.X$6])/SUMPRODUCT(([.K30:.X30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30:.AL30];[.AB$6:.AL$6])/SUMPRODUCT(([.AB30:.AL30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30:.AZ30];[.AP$6:.AZ$6])/SUMPRODUCT(([.AP30:.AZ30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30:.BN30];[.BD$6:.BN$6])/SUMPRODUCT(([.BD30:.BN30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31:.X31];[.K$6:.X$6])/SUMPRODUCT(([.K31:.X31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31:.AL31];[.AB$6:.AL$6])/SUMPRODUCT(([.AB31:.AL31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31:.AZ31];[.AP$6:.AZ$6])/SUMPRODUCT(([.AP31:.AZ31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31:.BN31];[.BD$6:.BN$6])/SUMPRODUCT(([.BD31:.BN31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32:.X32];[.K$6:.X$6])/SUMPRODUCT(([.K32:.X32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32:.AL32];[.AB$6:.AL$6])/SUMPRODUCT(([.AB32:.AL32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32:.AZ32];[.AP$6:.AZ$6])/SUMPRODUCT(([.AP32:.AZ32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32:.BN32];[.BD$6:.BN$6])/SUMPRODUCT(([.BD32:.BN32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33:.X33];[.K$6:.X$6])/SUMPRODUCT(([.K33:.X33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33:.AL33];[.AB$6:.AL$6])/SUMPRODUCT(([.AB33:.AL33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33:.AZ33];[.AP$6:.AZ$6])/SUMPRODUCT(([.AP33:.AZ33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33:.BN33];[.BD$6:.BN$6])/SUMPRODUCT(([.BD33:.BN33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34:.X34];[.K$6:.X$6])/SUMPRODUCT(([.K34:.X34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34:.AL34];[.AB$6:.AL$6])/SUMPRODUCT(([.AB34:.AL34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34:.AZ34];[.AP$6:.AZ$6])/SUMPRODUCT(([.AP34:.AZ34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34:.BN34];[.BD$6:.BN$6])/SUMPRODUCT(([.BD34:.BN34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35:.X35];[.K$6:.X$6])/SUMPRODUCT(([.K35:.X35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35:.AL35];[.AB$6:.AL$6])/SUMPRODUCT(([.AB35:.AL35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35:.AZ35];[.AP$6:.AZ$6])/SUMPRODUCT(([.AP35:.AZ35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35:.BN35];[.BD$6:.BN$6])/SUMPRODUCT(([.BD35:.BN35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36:.X36];[.K$6:.X$6])/SUMPRODUCT(([.K36:.X36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36:.AL36];[.AB$6:.AL$6])/SUMPRODUCT(([.AB36:.AL36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36:.AZ36];[.AP$6:.AZ$6])/SUMPRODUCT(([.AP36:.AZ36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36:.BN36];[.BD$6:.BN$6])/SUMPRODUCT(([.BD36:.BN36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37:.X37];[.K$6:.X$6])/SUMPRODUCT(([.K37:.X37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37:.AL37];[.AB$6:.AL$6])/SUMPRODUCT(([.AB37:.AL37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37:.AZ37];[.AP$6:.AZ$6])/SUMPRODUCT(([.AP37:.AZ37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37:.BN37];[.BD$6:.BN$6])/SUMPRODUCT(([.BD37:.BN37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38:.X38];[.K$6:.X$6])/SUMPRODUCT(([.K38:.X38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38:.AL38];[.AB$6:.AL$6])/SUMPRODUCT(([.AB38:.AL38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38:.AZ38];[.AP$6:.AZ$6])/SUMPRODUCT(([.AP38:.AZ38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38:.BN38];[.BD$6:.BN$6])/SUMPRODUCT(([.BD38:.BN38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19"/>
          <table:table-cell table:style-name="ce26"/>
          <table:table-cell table:style-name="ce30" table:number-columns-repeated="2"/>
          <table:table-cell table:style-name="ce33"/>
          <table:table-cell table:style-name="ce38" office:value-type="string" calcext:value-type="string">
            <text:p>-</text:p>
          </table:table-cell>
          <table:table-cell table:style-name="ce44"/>
          <table:table-cell table:style-name="ce52"/>
          <table:table-cell table:style-name="ce56" table:number-columns-repeated="2"/>
          <table:table-cell table:style-name="ce61"/>
          <table:table-cell table:style-name="ce56" table:number-columns-repeated="9"/>
          <table:table-cell table:style-name="ce66"/>
          <table:table-cell table:style-name="ce71" table:formula="of:=IFERROR(SUMPRODUCT([.K39:.X39];[.K$6:.X$6])/SUMPRODUCT(([.K39:.X39]&lt;&gt;&quot;&quot;)*([.K$6:.X$6]&lt;&gt;&quot;&quot;);[.K$6:.X$6]);&quot;&quot;)">
            <text:p/>
          </table:table-cell>
          <table:table-cell table:style-name="ce73"/>
          <table:table-cell table:style-name="ce44"/>
          <table:table-cell table:style-name="ce52"/>
          <table:table-cell table:style-name="ce56" table:number-columns-repeated="9"/>
          <table:table-cell table:style-name="ce66"/>
          <table:table-cell table:style-name="ce71" table:formula="of:=IFERROR(SUMPRODUCT([.AB39:.AL39];[.AB$6:.AL$6])/SUMPRODUCT(([.AB39:.AL39]&lt;&gt;&quot;&quot;)*([.AB$6:.AL$6]&lt;&gt;&quot;&quot;);[.AB$6:.AL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6"/>
          <table:table-cell table:style-name="ce55" table:number-columns-repeated="3"/>
          <table:table-cell table:style-name="ce56"/>
          <table:table-cell table:style-name="ce71" table:formula="of:=IFERROR(SUMPRODUCT([.AP39:.AZ39];[.AP$6:.AZ$6])/SUMPRODUCT(([.AP39:.AZ39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51"/>
          <table:table-cell table:style-name="ce56" table:number-columns-repeated="2"/>
          <table:table-cell table:style-name="ce55"/>
          <table:table-cell table:style-name="ce56" table:number-columns-repeated="7"/>
          <table:table-cell table:style-name="ce71" table:formula="of:=IFERROR(SUMPRODUCT([.BD39:.BN39];[.BD$6:.BN$6])/SUMPRODUCT(([.BD39:.BN39]&lt;&gt;&quot;&quot;)*([.BD$6:.BN$6]&lt;&gt;&quot;&quot;);[.BD$6:.BN$6]);&quot;&quot;)">
            <text:p/>
          </table:table-cell>
          <table:table-cell table:style-name="ce73"/>
          <table:table-cell table:number-columns-repeated="955"/>
        </table:table-row>
        <table:table-row table:style-name="ro6">
          <table:table-cell table:style-name="ce7" office:value-type="float" office:value="32" calcext:value-type="float">
            <text:p>32</text:p>
          </table:table-cell>
          <table:table-cell table:style-name="ce12" table:number-columns-repeated="2"/>
          <table:table-cell table:style-name="ce19"/>
          <table:table-cell table:style-name="ce27"/>
          <table:table-cell table:style-name="ce31" table:number-columns-repeated="2"/>
          <table:table-cell table:style-name="ce34"/>
          <table:table-cell table:style-name="ce34" office:value-type="string" calcext:value-type="string">
            <text:p>-</text:p>
          </table:table-cell>
          <table:table-cell table:style-name="ce44"/>
          <table:table-cell table:style-name="ce27"/>
          <table:table-cell table:style-name="ce31" table:number-columns-repeated="2"/>
          <table:table-cell table:style-name="ce61"/>
          <table:table-cell table:style-name="ce31" table:number-columns-repeated="9"/>
          <table:table-cell table:style-name="ce67"/>
          <table:table-cell table:style-name="ce71" table:formula="of:=IFERROR(SUMPRODUCT([.K40:.X40];[.K$6:.X$6])/SUMPRODUCT(([.K40:.X40]&lt;&gt;&quot;&quot;)*([.K$6:.X$6]&lt;&gt;&quot;&quot;);[.K$6:.X$6]);&quot;&quot;)">
            <text:p/>
          </table:table-cell>
          <table:table-cell table:style-name="ce74"/>
          <table:table-cell table:style-name="ce44"/>
          <table:table-cell table:style-name="ce27"/>
          <table:table-cell table:style-name="ce31" table:number-columns-repeated="9"/>
          <table:table-cell table:style-name="ce67"/>
          <table:table-cell table:style-name="ce71" table:formula="of:=IFERROR(SUMPRODUCT([.AB40:.AL40];[.AB$6:.AL$6])/SUMPRODUCT(([.AB40:.AL40]&lt;&gt;&quot;&quot;)*([.AB$6:.AL$6]&lt;&gt;&quot;&quot;);[.AB$6:.AL$6]);&quot;&quot;)">
            <text:p/>
          </table:table-cell>
          <table:table-cell table:style-name="ce80"/>
          <table:table-cell table:style-name="ce44"/>
          <table:table-cell table:style-name="ce27"/>
          <table:table-cell table:style-name="ce31" table:number-columns-repeated="9"/>
          <table:table-cell table:style-name="ce67"/>
          <table:table-cell table:style-name="ce71" table:formula="of:=IFERROR(SUMPRODUCT([.AP40:.AZ40];[.AP$6:.AZ$6])/SUMPRODUCT(([.AP40:.AZ40]&lt;&gt;&quot;&quot;)*([.AP$6:.AZ$6]&lt;&gt;&quot;&quot;);[.AP$6:.AZ$6]);&quot;&quot;)">
            <text:p/>
          </table:table-cell>
          <table:table-cell table:style-name="ce73"/>
          <table:table-cell table:style-name="ce44"/>
          <table:table-cell table:style-name="ce27"/>
          <table:table-cell table:style-name="ce31" table:number-columns-repeated="9"/>
          <table:table-cell table:style-name="ce67"/>
          <table:table-cell table:style-name="ce71" table:formula="of:=IFERROR(SUMPRODUCT([.BD40:.BN40];[.BD$6:.BN$6])/SUMPRODUCT(([.BD40:.BN40]&lt;&gt;&quot;&quot;)*([.BD$6:.BN$6]&lt;&gt;&quot;&quot;);[.BD$6:.BN$6]);&quot;&quot;)">
            <text:p/>
          </table:table-cell>
          <table:table-cell table:style-name="ce74"/>
          <table:table-cell table:number-columns-repeated="955"/>
        </table:table-row>
        <table:table-row table:style-name="ro6">
          <table:table-cell table:style-name="ce4"/>
          <table:table-cell table:style-name="ce13" office:value-type="string" calcext:value-type="string">
            <text:p>Durchschnitt</text:p>
          </table:table-cell>
          <table:table-cell table:style-name="ce13"/>
          <table:table-cell table:style-name="ce18"/>
          <table:table-cell table:style-name="ce28" table:formula="of:=IFERROR(AVERAGEIF([.E9:.E40]; &quot;&lt;&gt;&quot;);&quot;&quot;)">
            <text:p/>
          </table:table-cell>
          <table:table-cell table:style-name="ce28" table:formula="of:=IFERROR(AVERAGEIF([.F9:.F40]; &quot;&lt;&gt;&quot;);&quot;&quot;)">
            <text:p/>
          </table:table-cell>
          <table:table-cell table:style-name="ce28" table:formula="of:=IFERROR(AVERAGEIF([.G9:.G40]; &quot;&lt;&gt;&quot;);&quot;&quot;)">
            <text:p/>
          </table:table-cell>
          <table:table-cell table:style-name="ce28" table:formula="of:=IFERROR(AVERAGEIF([.H9:.H40]; &quot;&lt;&gt;&quot;);&quot;&quot;)">
            <text:p/>
          </table:table-cell>
          <table:table-cell table:style-name="ce28" table:formula="of:=IFERROR(AVERAGEIF([.I9:.I40]; &quot;&lt;&gt;&quot;);&quot;&quot;)">
            <text:p/>
          </table:table-cell>
          <table:table-cell table:style-name="ce45"/>
          <table:table-cell table:style-name="ce28" table:formula="of:=IFERROR(AVERAGEIF([.K9:.K40]; &quot;&lt;&gt;&quot;);&quot;&quot;)">
            <text:p/>
          </table:table-cell>
          <table:table-cell table:style-name="ce28" table:formula="of:=IFERROR(AVERAGEIF([.L9:.L40]; &quot;&lt;&gt;&quot;);&quot;&quot;)">
            <text:p/>
          </table:table-cell>
          <table:table-cell table:style-name="ce28" table:formula="of:=IFERROR(AVERAGEIF([.M9:.M40]; &quot;&lt;&gt;&quot;);&quot;&quot;)">
            <text:p/>
          </table:table-cell>
          <table:table-cell table:style-name="ce28" table:formula="of:=IFERROR(AVERAGEIF([.N9:.N40]; &quot;&lt;&gt;&quot;);&quot;&quot;)">
            <text:p/>
          </table:table-cell>
          <table:table-cell table:style-name="ce28" table:formula="of:=IFERROR(AVERAGEIF([.O9:.O40]; &quot;&lt;&gt;&quot;);&quot;&quot;)">
            <text:p/>
          </table:table-cell>
          <table:table-cell table:style-name="ce28" table:formula="of:=IFERROR(AVERAGEIF([.P9:.P40]; &quot;&lt;&gt;&quot;);&quot;&quot;)">
            <text:p/>
          </table:table-cell>
          <table:table-cell table:style-name="ce28" table:formula="of:=IFERROR(AVERAGEIF([.Q9:.Q40]; &quot;&lt;&gt;&quot;);&quot;&quot;)">
            <text:p/>
          </table:table-cell>
          <table:table-cell table:style-name="ce28" table:formula="of:=IFERROR(AVERAGEIF([.R9:.R40]; &quot;&lt;&gt;&quot;);&quot;&quot;)">
            <text:p/>
          </table:table-cell>
          <table:table-cell table:style-name="ce28" table:formula="of:=IFERROR(AVERAGEIF([.S9:.S40]; &quot;&lt;&gt;&quot;);&quot;&quot;)">
            <text:p/>
          </table:table-cell>
          <table:table-cell table:style-name="ce28" table:formula="of:=IFERROR(AVERAGEIF([.T9:.T40]; &quot;&lt;&gt;&quot;);&quot;&quot;)">
            <text:p/>
          </table:table-cell>
          <table:table-cell table:style-name="ce28" table:formula="of:=IFERROR(AVERAGEIF([.U9:.U40]; &quot;&lt;&gt;&quot;);&quot;&quot;)">
            <text:p/>
          </table:table-cell>
          <table:table-cell table:style-name="ce28" table:formula="of:=IFERROR(AVERAGEIF([.V9:.V40]; &quot;&lt;&gt;&quot;);&quot;&quot;)">
            <text:p/>
          </table:table-cell>
          <table:table-cell table:style-name="ce28" table:formula="of:=IFERROR(AVERAGEIF([.W9:.W40]; &quot;&lt;&gt;&quot;);&quot;&quot;)">
            <text:p/>
          </table:table-cell>
          <table:table-cell table:style-name="ce28" table:formula="of:=IFERROR(AVERAGEIF([.X9:.X40]; &quot;&lt;&gt;&quot;);&quot;&quot;)">
            <text:p/>
          </table:table-cell>
          <table:table-cell table:style-name="ce28" table:formula="of:=IFERROR(AVERAGEIF([.Y9:.Y40]; &quot;&lt;&gt;&quot;);&quot;&quot;)">
            <text:p/>
          </table:table-cell>
          <table:table-cell table:style-name="ce28" table:formula="of:=IFERROR(AVERAGEIF([.Z9:.Z40]; &quot;&lt;&gt;&quot;);&quot;&quot;)">
            <text:p/>
          </table:table-cell>
          <table:table-cell table:style-name="ce44"/>
          <table:table-cell table:style-name="ce28" table:formula="of:=IFERROR(AVERAGEIF([.AB9:.AB40]; &quot;&lt;&gt;&quot;);&quot;&quot;)">
            <text:p/>
          </table:table-cell>
          <table:table-cell table:style-name="ce28" table:formula="of:=IFERROR(AVERAGEIF([.AC9:.AC40]; &quot;&lt;&gt;&quot;);&quot;&quot;)">
            <text:p/>
          </table:table-cell>
          <table:table-cell table:style-name="ce28" table:formula="of:=IFERROR(AVERAGEIF([.AD9:.AD40]; &quot;&lt;&gt;&quot;);&quot;&quot;)">
            <text:p/>
          </table:table-cell>
          <table:table-cell table:style-name="ce28" table:formula="of:=IFERROR(AVERAGEIF([.AE9:.AE40]; &quot;&lt;&gt;&quot;);&quot;&quot;)">
            <text:p/>
          </table:table-cell>
          <table:table-cell table:style-name="ce28" table:formula="of:=IFERROR(AVERAGEIF([.AF9:.AF40]; &quot;&lt;&gt;&quot;);&quot;&quot;)">
            <text:p/>
          </table:table-cell>
          <table:table-cell table:style-name="ce28" table:formula="of:=IFERROR(AVERAGEIF([.AG9:.AG40]; &quot;&lt;&gt;&quot;);&quot;&quot;)">
            <text:p/>
          </table:table-cell>
          <table:table-cell table:style-name="ce28" table:formula="of:=IFERROR(AVERAGEIF([.AH9:.AH40]; &quot;&lt;&gt;&quot;);&quot;&quot;)">
            <text:p/>
          </table:table-cell>
          <table:table-cell table:style-name="ce28" table:formula="of:=IFERROR(AVERAGEIF([.AI9:.AI40]; &quot;&lt;&gt;&quot;);&quot;&quot;)">
            <text:p/>
          </table:table-cell>
          <table:table-cell table:style-name="ce28" table:formula="of:=IFERROR(AVERAGEIF([.AJ9:.AJ40]; &quot;&lt;&gt;&quot;);&quot;&quot;)">
            <text:p/>
          </table:table-cell>
          <table:table-cell table:style-name="ce28" table:formula="of:=IFERROR(AVERAGEIF([.AK9:.AK40]; &quot;&lt;&gt;&quot;);&quot;&quot;)">
            <text:p/>
          </table:table-cell>
          <table:table-cell table:style-name="ce28" table:formula="of:=IFERROR(AVERAGEIF([.AL9:.AL40]; &quot;&lt;&gt;&quot;);&quot;&quot;)">
            <text:p/>
          </table:table-cell>
          <table:table-cell table:style-name="ce28" table:formula="of:=IFERROR(AVERAGEIF([.AM9:.AM40]; &quot;&lt;&gt;&quot;);&quot;&quot;)">
            <text:p/>
          </table:table-cell>
          <table:table-cell table:style-name="ce28" table:formula="of:=IFERROR(AVERAGEIF([.AN9:.AN40]; &quot;&lt;&gt;&quot;);&quot;&quot;)">
            <text:p/>
          </table:table-cell>
          <table:table-cell table:style-name="ce44"/>
          <table:table-cell table:style-name="ce28" table:formula="of:=IFERROR(AVERAGEIF([.AP9:.AP40]; &quot;&lt;&gt;&quot;);&quot;&quot;)">
            <text:p/>
          </table:table-cell>
          <table:table-cell table:style-name="ce28" table:formula="of:=IFERROR(AVERAGEIF([.AQ9:.AQ40]; &quot;&lt;&gt;&quot;);&quot;&quot;)">
            <text:p/>
          </table:table-cell>
          <table:table-cell table:style-name="ce28" table:formula="of:=IFERROR(AVERAGEIF([.AR9:.AR40]; &quot;&lt;&gt;&quot;);&quot;&quot;)">
            <text:p/>
          </table:table-cell>
          <table:table-cell table:style-name="ce28" table:formula="of:=IFERROR(AVERAGEIF([.AS9:.AS40]; &quot;&lt;&gt;&quot;);&quot;&quot;)">
            <text:p/>
          </table:table-cell>
          <table:table-cell table:style-name="ce28" table:formula="of:=IFERROR(AVERAGEIF([.AT9:.AT40]; &quot;&lt;&gt;&quot;);&quot;&quot;)">
            <text:p/>
          </table:table-cell>
          <table:table-cell table:style-name="ce28" table:formula="of:=IFERROR(AVERAGEIF([.AU9:.AU40]; &quot;&lt;&gt;&quot;);&quot;&quot;)">
            <text:p/>
          </table:table-cell>
          <table:table-cell table:style-name="ce28" table:formula="of:=IFERROR(AVERAGEIF([.AV9:.AV40]; &quot;&lt;&gt;&quot;);&quot;&quot;)">
            <text:p/>
          </table:table-cell>
          <table:table-cell table:style-name="ce28" table:formula="of:=IFERROR(AVERAGEIF([.AW9:.AW40]; &quot;&lt;&gt;&quot;);&quot;&quot;)">
            <text:p/>
          </table:table-cell>
          <table:table-cell table:style-name="ce28" table:formula="of:=IFERROR(AVERAGEIF([.AX9:.AX40]; &quot;&lt;&gt;&quot;);&quot;&quot;)">
            <text:p/>
          </table:table-cell>
          <table:table-cell table:style-name="ce28" table:formula="of:=IFERROR(AVERAGEIF([.AY9:.AY40]; &quot;&lt;&gt;&quot;);&quot;&quot;)">
            <text:p/>
          </table:table-cell>
          <table:table-cell table:style-name="ce28" table:formula="of:=IFERROR(AVERAGEIF([.AZ9:.AZ40]; &quot;&lt;&gt;&quot;);&quot;&quot;)">
            <text:p/>
          </table:table-cell>
          <table:table-cell table:style-name="ce28" table:formula="of:=IFERROR(AVERAGEIF([.BA9:.BA40]; &quot;&lt;&gt;&quot;);&quot;&quot;)">
            <text:p/>
          </table:table-cell>
          <table:table-cell table:style-name="ce28" table:formula="of:=IFERROR(AVERAGEIF([.BB9:.BB40]; &quot;&lt;&gt;&quot;);&quot;&quot;)">
            <text:p/>
          </table:table-cell>
          <table:table-cell table:style-name="ce44"/>
          <table:table-cell table:style-name="ce28" table:formula="of:=IFERROR(AVERAGEIF([.BD9:.BD40]; &quot;&lt;&gt;&quot;);&quot;&quot;)">
            <text:p/>
          </table:table-cell>
          <table:table-cell table:style-name="ce28" table:formula="of:=IFERROR(AVERAGEIF([.BE9:.BE40]; &quot;&lt;&gt;&quot;);&quot;&quot;)">
            <text:p/>
          </table:table-cell>
          <table:table-cell table:style-name="ce28" table:formula="of:=IFERROR(AVERAGEIF([.BF9:.BF40]; &quot;&lt;&gt;&quot;);&quot;&quot;)">
            <text:p/>
          </table:table-cell>
          <table:table-cell table:style-name="ce28" table:formula="of:=IFERROR(AVERAGEIF([.BG9:.BG40]; &quot;&lt;&gt;&quot;);&quot;&quot;)">
            <text:p/>
          </table:table-cell>
          <table:table-cell table:style-name="ce28" table:formula="of:=IFERROR(AVERAGEIF([.BH9:.BH40]; &quot;&lt;&gt;&quot;);&quot;&quot;)">
            <text:p/>
          </table:table-cell>
          <table:table-cell table:style-name="ce28" table:formula="of:=IFERROR(AVERAGEIF([.BI9:.BI40]; &quot;&lt;&gt;&quot;);&quot;&quot;)">
            <text:p/>
          </table:table-cell>
          <table:table-cell table:style-name="ce28" table:formula="of:=IFERROR(AVERAGEIF([.BJ9:.BJ40]; &quot;&lt;&gt;&quot;);&quot;&quot;)">
            <text:p/>
          </table:table-cell>
          <table:table-cell table:style-name="ce28" table:formula="of:=IFERROR(AVERAGEIF([.BK9:.BK40]; &quot;&lt;&gt;&quot;);&quot;&quot;)">
            <text:p/>
          </table:table-cell>
          <table:table-cell table:style-name="ce28" table:formula="of:=IFERROR(AVERAGEIF([.BL9:.BL40]; &quot;&lt;&gt;&quot;);&quot;&quot;)">
            <text:p/>
          </table:table-cell>
          <table:table-cell table:style-name="ce28" table:formula="of:=IFERROR(AVERAGEIF([.BM9:.BM40]; &quot;&lt;&gt;&quot;);&quot;&quot;)">
            <text:p/>
          </table:table-cell>
          <table:table-cell table:style-name="ce28" table:formula="of:=IFERROR(AVERAGEIF([.BN9:.BN40]; &quot;&lt;&gt;&quot;);&quot;&quot;)">
            <text:p/>
          </table:table-cell>
          <table:table-cell table:style-name="ce28" table:formula="of:=IFERROR(AVERAGEIF([.BO9:.BO40]; &quot;&lt;&gt;&quot;);&quot;&quot;)">
            <text:p/>
          </table:table-cell>
          <table:table-cell table:style-name="ce28" table:formula="of:=IFERROR(AVERAGEIF([.BP9:.BP40]; &quot;&lt;&gt;&quot;);&quot;&quot;)">
            <text:p/>
          </table:table-cell>
          <table:table-cell table:number-columns-repeated="955"/>
        </table:table-row>
        <table:table-row table:style-name="ro7" table:number-rows-repeated="1048534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Login_Daten" table:style-name="ta1">
        <office:forms form:automatic-focus="false" form:apply-design-mode="false"/>
        <table:table-column table:style-name="co15" table:default-cell-style-name="ce177"/>
        <table:table-column table:style-name="co14" table:default-cell-style-name="ce177"/>
        <table:table-row table:style-name="ro4">
          <table:table-cell office:value-type="string" calcext:value-type="string">
            <text:p>Passwortdatei</text:p>
          </table:table-cell>
          <table:table-cell/>
        </table:table-row>
        <table:table-row table:style-name="ro4">
          <table:table-cell office:value-type="string" calcext:value-type="string">
            <text:p>Lehrerkürzel</text:p>
          </table:table-cell>
          <table:table-cell office:value-type="string" calcext:value-type="string">
            <text:p>Passwort</text:p>
          </table:table-cell>
        </table:table-row>
        <table:table-row table:style-name="ro4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xtest</text:p>
          </table:table-cell>
        </table:table-row>
        <table:table-row table:style-name="ro4">
          <table:table-cell table:style-name="Default" office:value-type="string" calcext:value-type="string">
            <text:p>xxx</text:p>
          </table:table-cell>
          <table:table-cell table:style-name="Default" office:value-type="string" calcext:value-type="string">
            <text:p>xxx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0pt" style:font-name-asian="Noto Sans CJK SC" style:font-family-asian="'Noto Sans CJK SC'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number:number-style style:name="N156P0" style:volatile="true">
      <number:number number:decimal-places="1" number:min-decimal-places="1" number:min-integer-digits="1"/>
    </number:number-style>
    <number:number-style style:name="N156P1" style:volatile="true">
      <number:text>-</number:text>
      <number:number number:decimal-places="1" number:min-decimal-places="1" number:min-integer-digits="1"/>
    </number:number-style>
    <number:number-style style:name="N156P2" style:volatile="true">
      <number:text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2cm" fo:margin-right="2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1cm" fo:margin-left="1cm" fo:margin-right="1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.00.0000</text:date>, <text:time style:data-style-name="N2" text:time-value="19:50:40.88378911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Zeugnis" style:display-name="PageStyle_Zeugn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.u2._20_HJ" style:display-name="PageStyle_1.u2. HJ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2T14:46:29.600141255</meta:creation-date>
    <meta:editing-duration>PT29M13S</meta:editing-duration>
    <meta:generator>LibreOffice/26.2.4.2$Linux_X86_64 LibreOffice_project/620$Build-2</meta:generator>
    <meta:editing-cycles>11</meta:editing-cycles>
    <dc:date>2026-07-02T19:51:23.128246378</dc:date>
    <meta:document-statistic meta:table-count="2" meta:cell-count="477" meta:object-count="0"/>
    <meta:user-defined meta:name="AppVersion">14.0300</meta:user-defined>
  </office:meta>
</office:document-meta>
</file>